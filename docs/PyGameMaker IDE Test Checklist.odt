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HTML">
      <style:paragraph-properties fo:margin-left="0cm" fo:margin-right="0cm" fo:text-indent="0cm" style:auto-text-indent="false" style:page-number="auto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0b0079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0b0079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paragraph-properties fo:margin-top="0cm" fo:margin-bottom="0cm" style:contextual-spacing="false"/>
      <style:text-properties officeooo:paragraph-rsid="000b0079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cm" fo:margin-bottom="0cm" style:contextual-spacing="false"/>
      <style:text-properties officeooo:paragraph-rsid="000b0079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Heading_20_3">
      <style:paragraph-properties fo:margin-left="0cm" fo:margin-right="0cm" fo:text-indent="0cm" style:auto-text-indent="false" fo:break-before="page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officeooo:paragraph-rsid="000b0079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cm" fo:margin-bottom="0cm" style:contextual-spacing="false"/>
      <style:text-properties officeooo:paragraph-rsid="000b0079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cm" fo:margin-bottom="0cm" style:contextual-spacing="false"/>
      <style:text-properties officeooo:paragraph-rsid="000b0079"/>
    </style:style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paragraph-properties fo:margin-top="0cm" fo:margin-bottom="0cm" style:contextual-spacing="false"/>
      <style:text-properties officeooo:paragraph-rsid="000b0079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  <style:text-properties officeooo:paragraph-rsid="000b0079"/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10">
      <style:paragraph-properties fo:margin-top="0cm" fo:margin-bottom="0cm" style:contextual-spacing="false"/>
      <style:text-properties officeooo:paragraph-rsid="000b0079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paragraph-properties fo:margin-top="0cm" fo:margin-bottom="0cm" style:contextual-spacing="false"/>
      <style:text-properties officeooo:paragraph-rsid="000b0079"/>
    </style:style>
    <style:style style:name="P36" style:family="paragraph" style:parent-style-name="Text_20_body" style:list-style-name="L11">
      <style:text-properties officeooo:paragraph-rsid="000b0079"/>
    </style:style>
    <style:style style:name="P37" style:family="paragraph" style:parent-style-name="Text_20_body" style:list-style-name="L12">
      <style:paragraph-properties fo:margin-top="0cm" fo:margin-bottom="0cm" style:contextual-spacing="false"/>
      <style:text-properties officeooo:paragraph-rsid="000b0079"/>
    </style:style>
    <style:style style:name="P38" style:family="paragraph" style:parent-style-name="Text_20_body" style:list-style-name="L12"/>
    <style:style style:name="P39" style:family="paragraph" style:parent-style-name="Text_20_body" style:list-style-name="L13">
      <style:paragraph-properties fo:margin-top="0cm" fo:margin-bottom="0cm" style:contextual-spacing="false"/>
      <style:text-properties officeooo:paragraph-rsid="000b0079"/>
    </style:style>
    <style:style style:name="P40" style:family="paragraph" style:parent-style-name="Text_20_body" style:list-style-name="L13"/>
    <style:style style:name="P41" style:family="paragraph" style:parent-style-name="Text_20_body" style:list-style-name="L14">
      <style:paragraph-properties fo:margin-top="0cm" fo:margin-bottom="0cm" style:contextual-spacing="false"/>
      <style:text-properties officeooo:paragraph-rsid="000b0079"/>
    </style:style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>
      <style:paragraph-properties fo:margin-top="0cm" fo:margin-bottom="0cm" style:contextual-spacing="false"/>
      <style:text-properties officeooo:paragraph-rsid="000b0079"/>
    </style:style>
    <style:style style:name="P45" style:family="paragraph" style:parent-style-name="Text_20_body" style:list-style-name="L15">
      <style:paragraph-properties fo:margin-top="0cm" fo:margin-bottom="0cm" style:contextual-spacing="false"/>
    </style:style>
    <style:style style:name="P46" style:family="paragraph" style:parent-style-name="Text_20_body" style:list-style-name="L15"/>
    <style:style style:name="P47" style:family="paragraph" style:parent-style-name="Text_20_body" style:list-style-name="L16">
      <style:paragraph-properties fo:margin-top="0cm" fo:margin-bottom="0cm" style:contextual-spacing="false"/>
      <style:text-properties officeooo:paragraph-rsid="000b0079"/>
    </style:style>
    <style:style style:name="P48" style:family="paragraph" style:parent-style-name="Text_20_body" style:list-style-name="L16">
      <style:paragraph-properties fo:margin-top="0cm" fo:margin-bottom="0cm" style:contextual-spacing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>
      <style:paragraph-properties fo:margin-top="0cm" fo:margin-bottom="0cm" style:contextual-spacing="false"/>
      <style:text-properties officeooo:paragraph-rsid="000b0079"/>
    </style:style>
    <style:style style:name="P51" style:family="paragraph" style:parent-style-name="Text_20_body" style:list-style-name="L17">
      <style:paragraph-properties fo:margin-top="0cm" fo:margin-bottom="0cm" style:contextual-spacing="false"/>
    </style:style>
    <style:style style:name="P52" style:family="paragraph" style:parent-style-name="Text_20_body" style:list-style-name="L17"/>
    <style:style style:name="P53" style:family="paragraph" style:parent-style-name="Text_20_body" style:list-style-name="L18">
      <style:paragraph-properties fo:margin-top="0cm" fo:margin-bottom="0cm" style:contextual-spacing="false"/>
      <style:text-properties officeooo:paragraph-rsid="000b0079"/>
    </style:style>
    <style:style style:name="P54" style:family="paragraph" style:parent-style-name="Text_20_body" style:list-style-name="L18">
      <style:paragraph-properties fo:margin-top="0cm" fo:margin-bottom="0cm" style:contextual-spacing="false"/>
    </style:style>
    <style:style style:name="P55" style:family="paragraph" style:parent-style-name="Text_20_body" style:list-style-name="L18"/>
    <style:style style:name="P56" style:family="paragraph" style:parent-style-name="Text_20_body" style:list-style-name="L19">
      <style:paragraph-properties fo:margin-top="0cm" fo:margin-bottom="0cm" style:contextual-spacing="false"/>
      <style:text-properties officeooo:paragraph-rsid="000b0079"/>
    </style:style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19"/>
    <style:style style:name="P59" style:family="paragraph" style:parent-style-name="Text_20_body" style:list-style-name="L20">
      <style:paragraph-properties fo:margin-top="0cm" fo:margin-bottom="0cm" style:contextual-spacing="false"/>
      <style:text-properties officeooo:paragraph-rsid="000b0079"/>
    </style:style>
    <style:style style:name="P60" style:family="paragraph" style:parent-style-name="Text_20_body" style:list-style-name="L20">
      <style:paragraph-properties fo:margin-top="0cm" fo:margin-bottom="0cm" style:contextual-spacing="false"/>
    </style:style>
    <style:style style:name="P61" style:family="paragraph" style:parent-style-name="Text_20_body" style:list-style-name="L20"/>
    <style:style style:name="P62" style:family="paragraph" style:parent-style-name="Text_20_body" style:list-style-name="L21">
      <style:paragraph-properties fo:margin-top="0cm" fo:margin-bottom="0cm" style:contextual-spacing="false"/>
      <style:text-properties officeooo:paragraph-rsid="000b0079"/>
    </style:style>
    <style:style style:name="P63" style:family="paragraph" style:parent-style-name="Text_20_body" style:list-style-name="L21">
      <style:paragraph-properties fo:margin-top="0cm" fo:margin-bottom="0cm" style:contextual-spacing="false"/>
    </style:style>
    <style:style style:name="P64" style:family="paragraph" style:parent-style-name="Text_20_body" style:list-style-name="L21"/>
    <style:style style:name="P65" style:family="paragraph" style:parent-style-name="Text_20_body" style:list-style-name="L22">
      <style:paragraph-properties fo:margin-top="0cm" fo:margin-bottom="0cm" style:contextual-spacing="false"/>
      <style:text-properties officeooo:paragraph-rsid="000b0079"/>
    </style:style>
    <style:style style:name="P66" style:family="paragraph" style:parent-style-name="Text_20_body" style:list-style-name="L22"/>
    <style:style style:name="P67" style:family="paragraph" style:parent-style-name="Text_20_body" style:list-style-name="L23">
      <style:paragraph-properties fo:margin-top="0cm" fo:margin-bottom="0cm" style:contextual-spacing="false"/>
      <style:text-properties officeooo:paragraph-rsid="000b0079"/>
    </style:style>
    <style:style style:name="P68" style:family="paragraph" style:parent-style-name="Text_20_body" style:list-style-name="L23">
      <style:paragraph-properties fo:margin-top="0cm" fo:margin-bottom="0cm" style:contextual-spacing="false"/>
    </style:style>
    <style:style style:name="P69" style:family="paragraph" style:parent-style-name="Text_20_body" style:list-style-name="L23"/>
    <style:style style:name="P70" style:family="paragraph" style:parent-style-name="Text_20_body" style:list-style-name="L24">
      <style:paragraph-properties fo:margin-top="0cm" fo:margin-bottom="0cm" style:contextual-spacing="false"/>
      <style:text-properties officeooo:paragraph-rsid="000b0079"/>
    </style:style>
    <style:style style:name="P71" style:family="paragraph" style:parent-style-name="Text_20_body" style:list-style-name="L24">
      <style:paragraph-properties fo:margin-top="0cm" fo:margin-bottom="0cm" style:contextual-spacing="false"/>
    </style:style>
    <style:style style:name="P72" style:family="paragraph" style:parent-style-name="Text_20_body" style:list-style-name="L24"/>
    <style:style style:name="P73" style:family="paragraph" style:parent-style-name="Text_20_body" style:list-style-name="L25">
      <style:paragraph-properties fo:margin-top="0cm" fo:margin-bottom="0cm" style:contextual-spacing="false"/>
      <style:text-properties officeooo:paragraph-rsid="000b0079"/>
    </style:style>
    <style:style style:name="P74" style:family="paragraph" style:parent-style-name="Text_20_body" style:list-style-name="L25">
      <style:paragraph-properties fo:margin-top="0cm" fo:margin-bottom="0cm" style:contextual-spacing="false"/>
    </style:style>
    <style:style style:name="P75" style:family="paragraph" style:parent-style-name="Text_20_body" style:list-style-name="L25"/>
    <style:style style:name="P76" style:family="paragraph" style:parent-style-name="Text_20_body" style:list-style-name="L26">
      <style:paragraph-properties fo:margin-top="0cm" fo:margin-bottom="0cm" style:contextual-spacing="false"/>
      <style:text-properties officeooo:paragraph-rsid="000b0079"/>
    </style:style>
    <style:style style:name="P77" style:family="paragraph" style:parent-style-name="Text_20_body" style:list-style-name="L26">
      <style:paragraph-properties fo:margin-top="0cm" fo:margin-bottom="0cm" style:contextual-spacing="false"/>
    </style:style>
    <style:style style:name="P78" style:family="paragraph" style:parent-style-name="Text_20_body" style:list-style-name="L26"/>
    <style:style style:name="P79" style:family="paragraph" style:parent-style-name="Text_20_body" style:list-style-name="L27">
      <style:paragraph-properties fo:margin-top="0cm" fo:margin-bottom="0cm" style:contextual-spacing="false"/>
      <style:text-properties officeooo:paragraph-rsid="000b0079"/>
    </style:style>
    <style:style style:name="P80" style:family="paragraph" style:parent-style-name="Text_20_body" style:list-style-name="L27">
      <style:paragraph-properties fo:margin-top="0cm" fo:margin-bottom="0cm" style:contextual-spacing="false"/>
    </style:style>
    <style:style style:name="P81" style:family="paragraph" style:parent-style-name="Text_20_body" style:list-style-name="L27"/>
    <style:style style:name="P82" style:family="paragraph" style:parent-style-name="Text_20_body" style:list-style-name="L28">
      <style:paragraph-properties fo:margin-top="0cm" fo:margin-bottom="0cm" style:contextual-spacing="false"/>
      <style:text-properties officeooo:paragraph-rsid="000b0079"/>
    </style:style>
    <style:style style:name="P83" style:family="paragraph" style:parent-style-name="Text_20_body" style:list-style-name="L28">
      <style:paragraph-properties fo:margin-top="0cm" fo:margin-bottom="0cm" style:contextual-spacing="false"/>
    </style:style>
    <style:style style:name="P84" style:family="paragraph" style:parent-style-name="Text_20_body" style:list-style-name="L28"/>
    <style:style style:name="P85" style:family="paragraph" style:parent-style-name="Text_20_body" style:list-style-name="L29">
      <style:paragraph-properties fo:margin-top="0cm" fo:margin-bottom="0cm" style:contextual-spacing="false"/>
      <style:text-properties officeooo:paragraph-rsid="000b0079"/>
    </style:style>
    <style:style style:name="P86" style:family="paragraph" style:parent-style-name="Text_20_body" style:list-style-name="L29">
      <style:paragraph-properties fo:margin-top="0cm" fo:margin-bottom="0cm" style:contextual-spacing="false"/>
    </style:style>
    <style:style style:name="P87" style:family="paragraph" style:parent-style-name="Text_20_body" style:list-style-name="L29"/>
    <style:style style:name="P88" style:family="paragraph" style:parent-style-name="Text_20_body" style:list-style-name="L30">
      <style:paragraph-properties fo:margin-top="0cm" fo:margin-bottom="0cm" style:contextual-spacing="false"/>
      <style:text-properties officeooo:paragraph-rsid="000b0079"/>
    </style:style>
    <style:style style:name="P89" style:family="paragraph" style:parent-style-name="Text_20_body" style:list-style-name="L30">
      <style:paragraph-properties fo:margin-top="0cm" fo:margin-bottom="0cm" style:contextual-spacing="false"/>
    </style:style>
    <style:style style:name="P90" style:family="paragraph" style:parent-style-name="Text_20_body" style:list-style-name="">
      <style:paragraph-properties fo:margin-top="0cm" fo:margin-bottom="0cm" style:contextual-spacing="false"/>
    </style:style>
    <style:style style:name="P91" style:family="paragraph" style:parent-style-name="Heading_20_3">
      <style:paragraph-properties fo:margin-left="0cm" fo:margin-right="0cm" fo:text-indent="0cm" style:auto-text-indent="false" fo:break-before="page"/>
      <style:text-properties officeooo:paragraph-rsid="000e0a05"/>
    </style:style>
    <style:style style:name="P92" style:family="paragraph" style:parent-style-name="Text_20_body" style:list-style-name="L30">
      <style:paragraph-properties fo:margin-top="0cm" fo:margin-bottom="0cm" style:contextual-spacing="false"/>
      <style:text-properties officeooo:paragraph-rsid="000e0a05"/>
    </style:style>
    <style:style style:name="P93" style:family="paragraph" style:parent-style-name="Text_20_body" style:list-style-name="L30"/>
    <style:style style:name="P94" style:family="paragraph" style:parent-style-name="Text_20_body" style:list-style-name="L31">
      <style:paragraph-properties fo:margin-top="0cm" fo:margin-bottom="0cm" style:contextual-spacing="false"/>
      <style:text-properties officeooo:paragraph-rsid="000b0079"/>
    </style:style>
    <style:style style:name="P95" style:family="paragraph" style:parent-style-name="Text_20_body" style:list-style-name="L31">
      <style:paragraph-properties fo:margin-top="0cm" fo:margin-bottom="0cm" style:contextual-spacing="false"/>
    </style:style>
    <style:style style:name="P96" style:family="paragraph" style:parent-style-name="Text_20_body" style:list-style-name="L31"/>
    <style:style style:name="P97" style:family="paragraph" style:parent-style-name="Text_20_body" style:list-style-name="L32">
      <style:paragraph-properties fo:margin-top="0cm" fo:margin-bottom="0cm" style:contextual-spacing="false"/>
      <style:text-properties officeooo:paragraph-rsid="000b0079"/>
    </style:style>
    <style:style style:name="P98" style:family="paragraph" style:parent-style-name="Text_20_body" style:list-style-name="L32">
      <style:paragraph-properties fo:margin-top="0cm" fo:margin-bottom="0cm" style:contextual-spacing="false"/>
    </style:style>
    <style:style style:name="P99" style:family="paragraph" style:parent-style-name="Text_20_body" style:list-style-name="L32"/>
    <style:style style:name="P100" style:family="paragraph" style:parent-style-name="Text_20_body" style:list-style-name="L33">
      <style:paragraph-properties fo:margin-top="0cm" fo:margin-bottom="0cm" style:contextual-spacing="false"/>
      <style:text-properties officeooo:paragraph-rsid="000b0079"/>
    </style:style>
    <style:style style:name="P101" style:family="paragraph" style:parent-style-name="Text_20_body" style:list-style-name="L33">
      <style:paragraph-properties fo:margin-top="0cm" fo:margin-bottom="0cm" style:contextual-spacing="false"/>
    </style:style>
    <style:style style:name="P102" style:family="paragraph" style:parent-style-name="Text_20_body" style:list-style-name="L33"/>
    <style:style style:name="P103" style:family="paragraph" style:parent-style-name="Text_20_body" style:list-style-name="L34">
      <style:paragraph-properties fo:margin-top="0cm" fo:margin-bottom="0cm" style:contextual-spacing="false"/>
      <style:text-properties officeooo:paragraph-rsid="000b0079"/>
    </style:style>
    <style:style style:name="P104" style:family="paragraph" style:parent-style-name="Text_20_body" style:list-style-name="L34">
      <style:paragraph-properties fo:margin-top="0cm" fo:margin-bottom="0cm" style:contextual-spacing="false"/>
    </style:style>
    <style:style style:name="P105" style:family="paragraph" style:parent-style-name="Text_20_body" style:list-style-name="L34"/>
    <style:style style:name="P106" style:family="paragraph" style:parent-style-name="Text_20_body" style:list-style-name="L35">
      <style:paragraph-properties fo:margin-top="0cm" fo:margin-bottom="0cm" style:contextual-spacing="false"/>
      <style:text-properties officeooo:paragraph-rsid="000b0079"/>
    </style:style>
    <style:style style:name="P107" style:family="paragraph" style:parent-style-name="Text_20_body" style:list-style-name="L35">
      <style:paragraph-properties fo:margin-top="0cm" fo:margin-bottom="0cm" style:contextual-spacing="false"/>
    </style:style>
    <style:style style:name="P108" style:family="paragraph" style:parent-style-name="Text_20_body" style:list-style-name="L35">
      <style:paragraph-properties fo:margin-top="0cm" fo:margin-bottom="0cm" style:contextual-spacing="false"/>
      <style:text-properties officeooo:paragraph-rsid="000e0a05"/>
    </style:style>
    <style:style style:name="P109" style:family="paragraph" style:parent-style-name="Text_20_body" style:list-style-name="L35"/>
    <style:style style:name="P110" style:family="paragraph" style:parent-style-name="Text_20_body" style:list-style-name="L36">
      <style:paragraph-properties fo:margin-top="0cm" fo:margin-bottom="0cm" style:contextual-spacing="false"/>
      <style:text-properties officeooo:paragraph-rsid="000b0079"/>
    </style:style>
    <style:style style:name="P111" style:family="paragraph" style:parent-style-name="Text_20_body" style:list-style-name="L36">
      <style:paragraph-properties fo:margin-top="0cm" fo:margin-bottom="0cm" style:contextual-spacing="false"/>
    </style:style>
    <style:style style:name="P112" style:family="paragraph" style:parent-style-name="Text_20_body" style:list-style-name="L36"/>
    <style:style style:name="P113" style:family="paragraph" style:parent-style-name="Text_20_body" style:list-style-name="L37">
      <style:paragraph-properties fo:margin-top="0cm" fo:margin-bottom="0cm" style:contextual-spacing="false"/>
      <style:text-properties officeooo:paragraph-rsid="000b0079"/>
    </style:style>
    <style:style style:name="P114" style:family="paragraph" style:parent-style-name="Text_20_body" style:list-style-name="L37">
      <style:paragraph-properties fo:margin-top="0cm" fo:margin-bottom="0cm" style:contextual-spacing="false"/>
    </style:style>
    <style:style style:name="P115" style:family="paragraph" style:parent-style-name="Text_20_body" style:list-style-name="L37"/>
    <style:style style:name="P116" style:family="paragraph" style:parent-style-name="Text_20_body" style:list-style-name="L38">
      <style:paragraph-properties fo:margin-top="0cm" fo:margin-bottom="0cm" style:contextual-spacing="false"/>
      <style:text-properties officeooo:paragraph-rsid="000b0079"/>
    </style:style>
    <style:style style:name="P117" style:family="paragraph" style:parent-style-name="Text_20_body" style:list-style-name="L38">
      <style:paragraph-properties fo:margin-top="0cm" fo:margin-bottom="0cm" style:contextual-spacing="false"/>
    </style:style>
    <style:style style:name="P118" style:family="paragraph" style:parent-style-name="Text_20_body" style:list-style-name="L38"/>
    <style:style style:name="P119" style:family="paragraph" style:parent-style-name="Text_20_body" style:list-style-name="L39">
      <style:paragraph-properties fo:margin-top="0cm" fo:margin-bottom="0cm" style:contextual-spacing="false"/>
      <style:text-properties officeooo:paragraph-rsid="000b0079"/>
    </style:style>
    <style:style style:name="P120" style:family="paragraph" style:parent-style-name="Text_20_body" style:list-style-name="L39">
      <style:paragraph-properties fo:margin-top="0cm" fo:margin-bottom="0cm" style:contextual-spacing="false"/>
    </style:style>
    <style:style style:name="P121" style:family="paragraph" style:parent-style-name="Text_20_body" style:list-style-name="L39"/>
    <style:style style:name="P122" style:family="paragraph" style:parent-style-name="Text_20_body" style:list-style-name="L40">
      <style:paragraph-properties fo:margin-top="0cm" fo:margin-bottom="0cm" style:contextual-spacing="false"/>
      <style:text-properties officeooo:paragraph-rsid="000b0079"/>
    </style:style>
    <style:style style:name="P123" style:family="paragraph" style:parent-style-name="Text_20_body" style:list-style-name="L40">
      <style:paragraph-properties fo:margin-top="0cm" fo:margin-bottom="0cm" style:contextual-spacing="false"/>
    </style:style>
    <style:style style:name="P124" style:family="paragraph" style:parent-style-name="Heading_20_3">
      <style:paragraph-properties fo:margin-left="0cm" fo:margin-right="0cm" fo:text-indent="0cm" style:auto-text-indent="false"/>
      <style:text-properties officeooo:paragraph-rsid="000e0a05"/>
    </style:style>
    <style:style style:name="P125" style:family="paragraph" style:parent-style-name="Text_20_body" style:list-style-name="L40">
      <style:paragraph-properties fo:margin-top="0cm" fo:margin-bottom="0cm" style:contextual-spacing="false"/>
      <style:text-properties officeooo:paragraph-rsid="000e0a05"/>
    </style:style>
    <style:style style:name="P126" style:family="paragraph" style:parent-style-name="Text_20_body" style:list-style-name="L40"/>
    <style:style style:name="P127" style:family="paragraph" style:parent-style-name="Text_20_body" style:list-style-name="L41">
      <style:paragraph-properties fo:margin-top="0cm" fo:margin-bottom="0cm" style:contextual-spacing="false"/>
      <style:text-properties officeooo:paragraph-rsid="000b0079"/>
    </style:style>
    <style:style style:name="P128" style:family="paragraph" style:parent-style-name="Text_20_body" style:list-style-name="L41">
      <style:paragraph-properties fo:margin-top="0cm" fo:margin-bottom="0cm" style:contextual-spacing="false"/>
    </style:style>
    <style:style style:name="P129" style:family="paragraph" style:parent-style-name="Text_20_body" style:list-style-name="L41"/>
    <style:style style:name="P130" style:family="paragraph" style:parent-style-name="Text_20_body" style:list-style-name="L42">
      <style:paragraph-properties fo:margin-top="0cm" fo:margin-bottom="0cm" style:contextual-spacing="false"/>
      <style:text-properties officeooo:paragraph-rsid="000b0079"/>
    </style:style>
    <style:style style:name="P131" style:family="paragraph" style:parent-style-name="Text_20_body" style:list-style-name="L42">
      <style:paragraph-properties fo:margin-top="0cm" fo:margin-bottom="0cm" style:contextual-spacing="false"/>
    </style:style>
    <style:style style:name="P132" style:family="paragraph" style:parent-style-name="Text_20_body" style:list-style-name="L42"/>
    <style:style style:name="P133" style:family="paragraph" style:parent-style-name="Text_20_body" style:list-style-name="L43">
      <style:paragraph-properties fo:margin-top="0cm" fo:margin-bottom="0cm" style:contextual-spacing="false"/>
      <style:text-properties officeooo:paragraph-rsid="000b0079"/>
    </style:style>
    <style:style style:name="P134" style:family="paragraph" style:parent-style-name="Text_20_body" style:list-style-name="L43">
      <style:paragraph-properties fo:margin-top="0cm" fo:margin-bottom="0cm" style:contextual-spacing="false"/>
    </style:style>
    <style:style style:name="P135" style:family="paragraph" style:parent-style-name="Text_20_body" style:list-style-name="L43"/>
    <style:style style:name="P136" style:family="paragraph" style:parent-style-name="Text_20_body" style:list-style-name="L44">
      <style:paragraph-properties fo:margin-top="0cm" fo:margin-bottom="0cm" style:contextual-spacing="false"/>
      <style:text-properties officeooo:paragraph-rsid="000b0079"/>
    </style:style>
    <style:style style:name="P137" style:family="paragraph" style:parent-style-name="Text_20_body" style:list-style-name="L44">
      <style:paragraph-properties fo:margin-top="0cm" fo:margin-bottom="0cm" style:contextual-spacing="false"/>
    </style:style>
    <style:style style:name="P138" style:family="paragraph" style:parent-style-name="Text_20_body" style:list-style-name="L44"/>
    <style:style style:name="P139" style:family="paragraph" style:parent-style-name="Text_20_body" style:list-style-name="L45">
      <style:paragraph-properties fo:margin-top="0cm" fo:margin-bottom="0cm" style:contextual-spacing="false"/>
      <style:text-properties officeooo:paragraph-rsid="000b0079"/>
    </style:style>
    <style:style style:name="P140" style:family="paragraph" style:parent-style-name="Text_20_body" style:list-style-name="L45">
      <style:paragraph-properties fo:margin-top="0cm" fo:margin-bottom="0cm" style:contextual-spacing="false"/>
    </style:style>
    <style:style style:name="P141" style:family="paragraph" style:parent-style-name="Text_20_body" style:list-style-name="L45"/>
    <style:style style:name="P142" style:family="paragraph" style:parent-style-name="Text_20_body" style:list-style-name="L46">
      <style:paragraph-properties fo:margin-top="0cm" fo:margin-bottom="0cm" style:contextual-spacing="false"/>
      <style:text-properties officeooo:paragraph-rsid="000b0079"/>
    </style:style>
    <style:style style:name="P143" style:family="paragraph" style:parent-style-name="Text_20_body" style:list-style-name="L46">
      <style:paragraph-properties fo:margin-top="0cm" fo:margin-bottom="0cm" style:contextual-spacing="false"/>
    </style:style>
    <style:style style:name="P144" style:family="paragraph" style:parent-style-name="Text_20_body" style:list-style-name="L46"/>
    <style:style style:name="P145" style:family="paragraph" style:parent-style-name="Text_20_body" style:list-style-name="L47">
      <style:paragraph-properties fo:margin-top="0cm" fo:margin-bottom="0cm" style:contextual-spacing="false"/>
      <style:text-properties officeooo:paragraph-rsid="000b0079"/>
    </style:style>
    <style:style style:name="P146" style:family="paragraph" style:parent-style-name="Text_20_body" style:list-style-name="L47">
      <style:paragraph-properties fo:margin-top="0cm" fo:margin-bottom="0cm" style:contextual-spacing="false"/>
    </style:style>
    <style:style style:name="P147" style:family="paragraph" style:parent-style-name="Text_20_body" style:list-style-name="L47"/>
    <style:style style:name="P148" style:family="paragraph" style:parent-style-name="Text_20_body" style:list-style-name="L48">
      <style:paragraph-properties fo:margin-top="0cm" fo:margin-bottom="0cm" style:contextual-spacing="false"/>
    </style:style>
    <style:style style:name="P149" style:family="paragraph" style:parent-style-name="Text_20_body" style:list-style-name="L48"/>
    <style:style style:name="P150" style:family="paragraph" style:parent-style-name="Text_20_body" style:list-style-name="L49">
      <style:paragraph-properties fo:margin-top="0cm" fo:margin-bottom="0cm" style:contextual-spacing="false"/>
      <style:text-properties officeooo:paragraph-rsid="000b0079"/>
    </style:style>
    <style:style style:name="P151" style:family="paragraph" style:parent-style-name="Text_20_body" style:list-style-name="L49">
      <style:paragraph-properties fo:margin-top="0cm" fo:margin-bottom="0cm" style:contextual-spacing="false"/>
    </style:style>
    <style:style style:name="P152" style:family="paragraph" style:parent-style-name="Text_20_body" style:list-style-name="L49"/>
    <style:style style:name="P153" style:family="paragraph" style:parent-style-name="Text_20_body" style:list-style-name="L50">
      <style:paragraph-properties fo:margin-top="0cm" fo:margin-bottom="0cm" style:contextual-spacing="false"/>
      <style:text-properties officeooo:paragraph-rsid="000b0079"/>
    </style:style>
    <style:style style:name="P154" style:family="paragraph" style:parent-style-name="Text_20_body" style:list-style-name="L50">
      <style:paragraph-properties fo:margin-top="0cm" fo:margin-bottom="0cm" style:contextual-spacing="false"/>
    </style:style>
    <style:style style:name="P155" style:family="paragraph" style:parent-style-name="Text_20_body" style:list-style-name="L50"/>
    <style:style style:name="P156" style:family="paragraph" style:parent-style-name="Text_20_body">
      <style:paragraph-properties fo:break-before="page"/>
    </style:style>
    <style:style style:name="T1" style:family="text">
      <style:text-properties officeooo:rsid="000b0079"/>
    </style:style>
    <style:style style:name="T2" style:family="text">
      <style:text-properties officeooo:rsid="000e0a05"/>
    </style:style>
    <text:list-style style:name="L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ygamemaker-ide-test-checklist"/>PyGameMaker IDE Test Checklist</text:p>
      <text:p text:style-name="Text_20_body">A comprehensive checklist for testing all features of PyGameMaker IDE.</text:p>
      <text:h text:style-name="P2" text:outline-level="2"><text:bookmark text:name="0-new-in-100-rc12-audit-visual-phase"/>0. New in 1.0.0-rc.12 (audit + visual phase)</text:h>
      <text:p text:style-name="Text_20_body">Specifically validates the work added in the rc.12 release. Each item references the commit it shipped in so a regression is easy to bisect.</text:p>
      <text:h text:style-name="P3" text:outline-level="3"><text:bookmark text:name="welcome-tab-commits-e42d4b6-7e86274-37d7186"/>Welcome tab (commits e42d4b6 / 7e86274 / 37d7186)</text:h>
      <text:list text:style-name="L1">
        <text:list-header>
          <text:p text:style-name="P4"><text:span text:style-name="T1">L </text:span><text:s/><text:span text:style-name="T1">M </text:span><text:s/><text:span text:style-name="T1">W</text:span> </text:p>
        </text:list-header>
        <text:list-item>
          <text:p text:style-name="P4">☐ ☐ ☐ Welcome tab is the default tab on first launch with no project </text:p>
        </text:list-item>
        <text:list-item>
          <text:p text:style-name="P5">☐ ☐ ☐ Title "Welcome to PyGameMaker IDE" + version label "v1.0.0-rc.12" visible </text:p>
        </text:list-item>
        <text:list-item>
          <text:p text:style-name="P5">☐ ☐ ☐ <text:span text:style-name="Strong_20_Emphasis">Get started</text:span> column shows New Project, Open Project, <text:span text:style-name="Strong_20_Emphasis">More options</text:span> dropdown </text:p>
        </text:list-item>
        <text:list-item>
          <text:p text:style-name="P5">☐ ☐ ☐ "More options" dropdown opens a menu with Open ZIP / Import GMK / Import Roberta entries </text:p>
        </text:list-item>
        <text:list-item>
          <text:p text:style-name="P5">☐ ☐ ☐ <text:span text:style-name="Strong_20_Emphasis">Continue where you left off</text:span> list shows recent projects with "N days ago" timestamps </text:p>
        </text:list-item>
        <text:list-item>
          <text:p text:style-name="P5">☐ ☐ ☐ Clicking a recent-project row opens that project </text:p>
        </text:list-item>
        <text:list-item>
          <text:p text:style-name="P5">☐ ☐ ☐ Recent-project list is wrapped in a visible rectangle (themed frame) </text:p>
        </text:list-item>
        <text:list-item>
          <text:p text:style-name="P5">☐ ☐ ☐ "Clear recent projects" link hides itself when the list is empty </text:p>
        </text:list-item>
        <text:list-item>
          <text:p text:style-name="P6">☐ ☐ ☐ Footer links (Documentation / Tutorials / About) open the right targets </text:p>
        </text:list-item>
      </text:list>
      <text:h text:style-name="P3" text:outline-level="3"><text:bookmark text:name="try-a-sample-game-bundled-samples-copy-on-open-commits-a8f78d0-f8a0eb7"/>Try a sample game — bundled samples + copy-on-open (commits a8f78d0 / f8a0eb7)</text:h>
      <text:list text:style-name="L2">
        <text:list-header>
          <text:p text:style-name="P7"><text:span text:style-name="T1">L </text:span><text:s/><text:span text:style-name="T1">M </text:span><text:s/><text:span text:style-name="T1">W</text:span> </text:p>
        </text:list-header>
        <text:list-item>
          <text:p text:style-name="P7">☐ ☐ ☐ <text:span text:style-name="Strong_20_Emphasis">Try a sample game</text:span> dropdown opens a menu listing Maze 1–3 </text:p>
        </text:list-item>
        <text:list-item>
          <text:p text:style-name="P8">☐ ☐ ☐ Clicking a sample opens <text:span text:style-name="Strong_20_Emphasis">immediately</text:span> — no "choose output folder" prompt, no GMK-import wait </text:p>
        </text:list-item>
        <text:list-item>
          <text:p text:style-name="P8">☐ ☐ ☐ After clicking, the IDE title shows the sample's name (e.g. <text:span text:style-name="Source_20_Text">maze_1 — PyGameMaker IDE</text:span>) </text:p>
        </text:list-item>
        <text:list-item>
          <text:p text:style-name="P8">☐ ☐ ☐ The newly-opened project lives at <text:span text:style-name="Source_20_Text">&lt;Documents&gt;/PyGameMaker Projects/&lt;sample&gt;/</text:span> — not under <text:span text:style-name="Source_20_Text">samples/</text:span> </text:p>
        </text:list-item>
        <text:list-item>
          <text:p text:style-name="P8">☐ ☐ ☐ Clicking the same sample twice opens a fresh copy at <text:span text:style-name="Source_20_Text">&lt;sample&gt;_2/</text:span>, leaving the first one alone </text:p>
        </text:list-item>
        <text:list-item>
          <text:p text:style-name="P8">☐ ☐ ☐ After editing and pressing Ctrl+S, only the working copy changes; <text:span text:style-name="Source_20_Text">samples/&lt;sample&gt;/</text:span> on disk is untouched </text:p>
        </text:list-item>
        <text:list-item>
          <text:p text:style-name="P9">☐ ☐ ☐ Each sample loads to an editable state (assets visible in the asset tree, rooms openable, etc.) </text:p>
        </text:list-item>
      </text:list>
      <text:h text:style-name="P3" text:outline-level="3"><text:bookmark text:name="window-title-commit-00911b3"/>Window title (commit 00911b3)</text:h>
      <text:list text:style-name="L3">
        <text:list-header>
          <text:p text:style-name="P10"><text:span text:style-name="T1">L </text:span><text:s/><text:span text:style-name="T1">M </text:span><text:s/><text:span text:style-name="T1">W</text:span> </text:p>
        </text:list-header>
        <text:list-item>
          <text:p text:style-name="P10">☐ ☐ ☐ No-project title: "PyGameMaker IDE" </text:p>
        </text:list-item>
        <text:list-item>
          <text:p text:style-name="P11">☐ ☐ ☐ Project loaded: "&lt;ProjectName&gt; — PyGameMaker IDE" </text:p>
        </text:list-item>
        <text:list-item>
          <text:p text:style-name="P11">☐ ☐ ☐ After unsaved edits: trailing " *" appears in title in real time </text:p>
        </text:list-item>
        <text:list-item>
          <text:p text:style-name="P12">☐ ☐ ☐ After save: " *" disappears </text:p>
        </text:list-item>
      </text:list>
      <text:h text:style-name="P3" text:outline-level="3"><text:bookmark text:name="toolbar-commit-00911b3"/>Toolbar (commit 00911b3)</text:h>
      <text:list text:style-name="L4">
        <text:list-header>
          <text:p text:style-name="P13"><text:span text:style-name="T1">L </text:span><text:s/><text:span text:style-name="T1">M </text:span><text:s/><text:span text:style-name="T1">W</text:span> </text:p>
        </text:list-header>
        <text:list-item>
          <text:p text:style-name="P13">☐ ☐ ☐ Hover any toolbar icon → tooltip with descriptive text + shortcut hint (e.g. "Save Project (Ctrl+S)", "Test Game (F5)") </text:p>
        </text:list-item>
        <text:list-item>
          <text:p text:style-name="P14">☐ ☐ ☐ Save / Test / Debug / Export / Import Sprite / Import Sound icons grey out when no project is open </text:p>
        </text:list-item>
        <text:list-item>
          <text:p text:style-name="P14">☐ ☐ ☐ Same icons enable correctly once a project is loaded </text:p>
        </text:list-item>
        <text:list-item>
          <text:p text:style-name="P15">☐ ☐ ☐ New / Open icons stay enabled in both states </text:p>
        </text:list-item>
      </text:list>
      <text:h text:style-name="P16" text:outline-level="3"><text:bookmark text:name="tools-menu-graying-commit-78e190d"/>Tools menu graying (commit 78e190d)</text:h>
      <text:list text:style-name="L5">
        <text:list-header>
          <text:p text:style-name="P17"><text:span text:style-name="T1">L </text:span><text:s/><text:span text:style-name="T1">M </text:span><text:s/><text:span text:style-name="T1">W</text:span> </text:p>
        </text:list-header>
        <text:list-item>
          <text:p text:style-name="P17">☐ ☐ ☐ No project loaded: "Validate Project", "Migrate to Modular Structure", and Thymio → Add Event / Add Action are greyed out </text:p>
        </text:list-item>
        <text:list-item>
          <text:p text:style-name="P18">☐ ☐ ☐ No project loaded: Preferences, Configure Action Blocks, Configure Thymio Blocks, Language, Open Playground, Import Open Roberta XML stay enabled </text:p>
        </text:list-item>
        <text:list-item>
          <text:p text:style-name="P19">☐ ☐ ☐ Project loaded: every Tools item becomes enabled </text:p>
        </text:list-item>
      </text:list>
      <text:h text:style-name="P3" text:outline-level="3"><text:bookmark text:name="asset-tree-empty-state-hint-commit-00911b3"/>Asset tree empty-state hint (commit 00911b3)</text:h>
      <text:list text:style-name="L6">
        <text:list-header>
          <text:p text:style-name="P20"><text:span text:style-name="T1">L </text:span><text:s/><text:span text:style-name="T1">M </text:span><text:s/><text:span text:style-name="T1">W</text:span> </text:p>
        </text:list-header>
        <text:list-item>
          <text:p text:style-name="P20">☐ ☐ ☐ No project loaded: italic hint visible below the category list ("No project loaded. Use File → New / Open Project to begin.") </text:p>
        </text:list-item>
        <text:list-item>
          <text:p text:style-name="P21">☐ ☐ ☐ Hint disappears once a project loads </text:p>
        </text:list-item>
        <text:list-item>
          <text:p text:style-name="P22">☐ ☐ ☐ Hint dims correctly under both light and dark themes </text:p>
        </text:list-item>
      </text:list>
      <text:h text:style-name="P3" text:outline-level="3"><text:bookmark text:name="right-panel-empty-state-placeholder-commit-00911b3"/>Right panel empty-state placeholder (commit 00911b3)</text:h>
      <text:list text:style-name="L7">
        <text:list-header>
          <text:p text:style-name="P23"><text:span text:style-name="T1">L </text:span><text:s/><text:span text:style-name="T1">M </text:span><text:s/><text:span text:style-name="T1">W</text:span> </text:p>
        </text:list-header>
        <text:list-item>
          <text:p text:style-name="P23">☐ ☐ ☐ No project loaded: the Asset Information / Properties / Preview group boxes are hidden; one centred italic message takes their place </text:p>
        </text:list-item>
        <text:list-item>
          <text:p text:style-name="P24">☐ ☐ ☐ Message appears in both light and dark themes </text:p>
        </text:list-item>
        <text:list-item>
          <text:p text:style-name="P25">☐ ☐ ☐ Project loaded: the three group boxes reappear; placeholder is hidden </text:p>
        </text:list-item>
      </text:list>
      <text:h text:style-name="P3" text:outline-level="3"><text:bookmark text:name="aseba-code-export-commit-71e19f3"/>Aseba code export (commit 71e19f3)</text:h>
      <text:list text:style-name="L8">
        <text:list-header>
          <text:p text:style-name="P26"><text:span text:style-name="T1">L </text:span><text:s/><text:span text:style-name="T1">M </text:span><text:s/><text:span text:style-name="T1">W</text:span> </text:p>
        </text:list-header>
        <text:list-item>
          <text:p text:style-name="P26">☐ ☐ ☐ File → Export menu contains "Export Aseba (Thymio) code…" </text:p>
        </text:list-item>
        <text:list-item>
          <text:p text:style-name="P27">☐ ☐ ☐ Item is greyed out when no project is open, enabled when one is </text:p>
        </text:list-item>
        <text:list-item>
          <text:p text:style-name="P27">☐ ☐ ☐ Clicking it prompts for an output directory </text:p>
        </text:list-item>
        <text:list-item>
          <text:p text:style-name="P27">☐ ☐ ☐ On a project with Thymio objects: writes one <text:span text:style-name="Source_20_Text">.aesl</text:span> per object + a <text:span text:style-name="Source_20_Text">README.md</text:span> to the chosen directory </text:p>
        </text:list-item>
        <text:list-item>
          <text:p text:style-name="P27">☐ ☐ ☐ On a project without Thymio objects: shows the "No Thymio objects found" warning instead of the generic failure dialog </text:p>
        </text:list-item>
        <text:list-item>
          <text:p text:style-name="P28">☐ ☐ ☐ Success dialog offers to open the output folder; works on Windows / macOS / Linux </text:p>
        </text:list-item>
      </text:list>
      <text:h text:style-name="P3" text:outline-level="3"><text:bookmark text:name="cross-platform-export-open-folder-prompts-commit-a44f750"/>Cross-platform export "open folder" prompts (commit a44f750)</text:h>
      <text:list text:style-name="L9">
        <text:list-header>
          <text:p text:style-name="P29"><text:span text:style-name="T1">L </text:span><text:s/><text:span text:style-name="T1">M </text:span><text:s/><text:span text:style-name="T1">W</text:span> </text:p>
        </text:list-header>
        <text:list-item>
          <text:p text:style-name="P29">☐ ☐ ☐ After a successful Linux-binary export, the "open folder?" prompt uses the correct OS-native open command (start / open / xdg-open) </text:p>
        </text:list-item>
        <text:list-item>
          <text:p text:style-name="P30">☐ ☐ ☐ Same for iOS export (where reachable) </text:p>
        </text:list-item>
        <text:list-item>
          <text:p text:style-name="P31">☐ ☐ ☐ Same for HTML5, exe, macos, android exports (regression check) </text:p>
        </text:list-item>
      </text:list>
      <text:h text:style-name="P3" text:outline-level="3"><text:bookmark text:name="localised-desktop-documents-defaults-commit-53ec9ae"/>Localised Desktop / Documents defaults (commit 53ec9ae)</text:h>
      <text:list text:style-name="L10">
        <text:list-header>
          <text:p text:style-name="P32"><text:span text:style-name="T1">L </text:span><text:s/><text:span text:style-name="T1">M </text:span><text:s/><text:span text:style-name="T1">W</text:span> </text:p>
        </text:list-header>
        <text:list-item>
          <text:p text:style-name="P32">☐ ☐ ☐ On Windows with OneDrive-redirected Desktop: export dialog defaults to the OneDrive-Desktop path, not a non-existent <text:span text:style-name="Source_20_Text">~/Desktop</text:span> </text:p>
        </text:list-item>
        <text:list-item>
          <text:p text:style-name="P33">☐ ☐ ☐ On Linux with non-English locale: export dialog defaults to the localised desktop folder (Bureau / Schreibtisch / etc.) </text:p>
        </text:list-item>
        <text:list-item>
          <text:p text:style-name="P34">☐ ☐ ☐ New-project dialog defaults to the localised Documents folder </text:p>
        </text:list-item>
      </text:list>
      <text:h text:style-name="P3" text:outline-level="3"><text:bookmark text:name="windows-console-flash-suppressed-commit-53ec9ae"/>Windows console flash suppressed (commit 53ec9ae)</text:h>
      <text:list text:style-name="L11">
        <text:list-header>
          <text:p text:style-name="P35"><text:span text:style-name="T1">L </text:span><text:s/><text:span text:style-name="T1">M </text:span><text:s/><text:span text:style-name="T1">W</text:span> </text:p>
        </text:list-header>
        <text:list-item>
          <text:p text:style-name="P36">☐ ☐ ☐ On Windows in dev mode, pressing F5 to Test Game: no <text:span text:style-name="Source_20_Text">python.exe</text:span> console window flashes before pygame opens </text:p>
        </text:list-item>
      </text:list>
      <text:h text:style-name="P3" text:outline-level="3"/>
      <text:h text:style-name="P16" text:outline-level="3"><text:bookmark text:name="dialog-button-bar-ordering-commit-00911b3"/>Dialog button bar ordering (commit 00911b3)</text:h>
      <text:list text:style-name="L12">
        <text:list-header>
          <text:p text:style-name="P37"><text:span text:style-name="T1">L </text:span><text:s/><text:span text:style-name="T1">M </text:span><text:s/><text:span text:style-name="T1">W</text:span> </text:p>
        </text:list-header>
        <text:list-item>
          <text:p text:style-name="P37">☐ ☐ ☐ Sprite Strip Import dialog: Cancel/OK button row follows the platform convention (OK-then-Cancel on Win/Linux, Cancel-then-OK on macOS) </text:p>
        </text:list-item>
        <text:list-item>
          <text:p text:style-name="P38">☐ ☐ ☐ Blockly Block Config dialog: Select All / Select None stay on the left; Save/Cancel pair on the right follows the platform convention </text:p>
        </text:list-item>
      </text:list>
      <text:h text:style-name="P3" text:outline-level="3"><text:bookmark text:name="translation-coverage-commit-ad47e68"/>Translation coverage (commit ad47e68)</text:h>
      <text:list text:style-name="L13">
        <text:list-header>
          <text:p text:style-name="P39"><text:span text:style-name="T1">L </text:span><text:s/><text:span text:style-name="T1">M </text:span><text:s/><text:span text:style-name="T1">W</text:span> </text:p>
        </text:list-header>
        <text:list-item>
          <text:p text:style-name="P39">☐ ☐ ☐ Switching language at runtime (Tools → Language) actually changes the visible labels (sanity check that .qm files load) </text:p>
        </text:list-item>
        <text:list-item>
          <text:p text:style-name="P40">☐ ☐ ☐ All 7 active languages (de, es, fr, it, ru, sl, uk) appear in the Language menu when their .qm files are present </text:p>
        </text:list-item>
      </text:list>
      <text:p text:style-name="Horizontal_20_Line"/>
      <text:h text:style-name="P2" text:outline-level="2"><text:bookmark text:name="1-application-startup-basic-operations"/>1. Application Startup &amp; Basic Operations</text:h>
      <text:list text:style-name="L14">
        <text:list-header>
          <text:p text:style-name="P41"><text:span text:style-name="T1">L </text:span><text:s/><text:span text:style-name="T1">M </text:span><text:s/><text:span text:style-name="T1">W</text:span> </text:p>
        </text:list-header>
        <text:list-item>
          <text:p text:style-name="P41">☐ ☐ ☐ Application launches without errors <text:span text:style-name="Emphasis">(verified post-</text:span><text:span text:style-name="Source_20_Text">afb9c75</text:span><text:span text:style-name="Emphasis">: clean console, no Qt UniqueConnection warning, no duplicate </text:span><text:span text:style-name="Source_20_Text">pygm.X</text:span><text:span text:style-name="Emphasis"> log lines)</text:span> </text:p>
        </text:list-item>
        <text:list-item>
          <text:p text:style-name="P41">☐ ☐ ☐ Main window displays correctly </text:p>
        </text:list-item>
        <text:list-item>
          <text:p text:style-name="P42">☐ ☐ ☐ Menu bar is visible and responsive </text:p>
        </text:list-item>
        <text:list-item>
          <text:p text:style-name="P42">☐ ☐ ☐ Toolbar buttons are visible and clickable </text:p>
        </text:list-item>
        <text:list-item>
          <text:p text:style-name="P42">☐ ☐ ☐ Status bar shows information </text:p>
        </text:list-item>
        <text:list-item>
          <text:p text:style-name="P42">☐ ☐ ☐ Asset tree panel is visible </text:p>
        </text:list-item>
        <text:list-item>
          <text:p text:style-name="P43">☐ ☐ ☐ Properties panel is visible </text:p>
        </text:list-item>
      </text:list>
      <text:h text:style-name="P2" text:outline-level="2"><text:bookmark text:name="2-project-management"/>2. Project Management</text:h>
      <text:list text:style-name="L15">
        <text:list-header>
          <text:p text:style-name="P44"><text:span text:style-name="T1">L </text:span><text:s/><text:span text:style-name="T1">M </text:span><text:s/><text:span text:style-name="T1">W</text:span> </text:p>
        </text:list-header>
        <text:list-item>
          <text:p text:style-name="P44">☐ ☐ ☐ Create new project (File &gt; New Project) </text:p>
        </text:list-item>
        <text:list-item>
          <text:p text:style-name="P45">☐ ☐ ☐ Open existing project (File &gt; Open Project) </text:p>
        </text:list-item>
        <text:list-item>
          <text:p text:style-name="P45">☐ ☐ ☐ Save project (File &gt; Save / Ctrl+S) </text:p>
        </text:list-item>
        <text:list-item>
          <text:p text:style-name="P45">☐ ☐ ☐ Save project as new name (File &gt; Save As) </text:p>
        </text:list-item>
        <text:list-item>
          <text:p text:style-name="P45">☐ ☐ ☐ Close project (File &gt; Close Project) </text:p>
        </text:list-item>
        <text:list-item>
          <text:p text:style-name="P45">☐ ☐ ☐ Recent projects list works </text:p>
        </text:list-item>
        <text:list-item>
          <text:p text:style-name="P46">☐ ☐ ☐ Project settings dialog opens and saves </text:p>
        </text:list-item>
      </text:list>
      <text:h text:style-name="P2" text:outline-level="2"><text:bookmark text:name="3-asset-tree-operations"/>3. Asset Tree Operations</text:h>
      <text:h text:style-name="P3" text:outline-level="3"><text:bookmark text:name="sprites"/>Sprites</text:h>
      <text:list text:style-name="L16">
        <text:list-header>
          <text:p text:style-name="P47"><text:span text:style-name="T1">L </text:span><text:s/><text:span text:style-name="T1">M </text:span><text:s/><text:span text:style-name="T1">W</text:span> </text:p>
        </text:list-header>
        <text:list-item>
          <text:p text:style-name="P47">☐ ☐ ☐ Create new sprite </text:p>
        </text:list-item>
        <text:list-item>
          <text:p text:style-name="P48">☐ ☐ ☐ Import sprite from image file (PNG, JPG, GIF) </text:p>
        </text:list-item>
        <text:list-item>
          <text:p text:style-name="P48">☐ ☐ ☐ Edit sprite properties (name, origin, collision mask) </text:p>
        </text:list-item>
        <text:list-item>
          <text:p text:style-name="P48">☐ ☐ ☐ Delete sprite </text:p>
        </text:list-item>
        <text:list-item>
          <text:p text:style-name="P48">☐ ☐ ☐ Duplicate sprite </text:p>
        </text:list-item>
        <text:list-item>
          <text:p text:style-name="P49">☐ ☐ ☐ Rename sprite </text:p>
        </text:list-item>
      </text:list>
      <text:h text:style-name="Heading_20_3" text:outline-level="3"><text:bookmark text:name="sounds"/>Sounds</text:h>
      <text:list text:style-name="L17">
        <text:list-header>
          <text:p text:style-name="P50"><text:span text:style-name="T1">L </text:span><text:s/><text:span text:style-name="T1">M </text:span><text:s/><text:span text:style-name="T1">W</text:span> </text:p>
        </text:list-header>
        <text:list-item>
          <text:p text:style-name="P50">☐ ☐ ☐ Create/import new sound (WAV, MP3, OGG) </text:p>
        </text:list-item>
        <text:list-item>
          <text:p text:style-name="P51">☐ ☐ ☐ Preview sound playback </text:p>
        </text:list-item>
        <text:list-item>
          <text:p text:style-name="P51">☐ ☐ ☐ Edit sound properties </text:p>
        </text:list-item>
        <text:list-item>
          <text:p text:style-name="P52">☐ ☐ ☐ Delete sound </text:p>
        </text:list-item>
      </text:list>
      <text:h text:style-name="P3" text:outline-level="3"><text:bookmark text:name="backgrounds"/><text:soft-page-break/>Backgrounds</text:h>
      <text:list text:style-name="L18">
        <text:list-header>
          <text:p text:style-name="P53"><text:span text:style-name="T1">L </text:span><text:s/><text:span text:style-name="T1">M </text:span><text:s/><text:span text:style-name="T1">W</text:span> </text:p>
        </text:list-header>
        <text:list-item>
          <text:p text:style-name="P53">☐ ☐ ☐ Create new background </text:p>
        </text:list-item>
        <text:list-item>
          <text:p text:style-name="P54">☐ ☐ ☐ Import background image </text:p>
        </text:list-item>
        <text:list-item>
          <text:p text:style-name="P54">☐ ☐ ☐ Edit background properties (tiling, scrolling) </text:p>
        </text:list-item>
        <text:list-item>
          <text:p text:style-name="P55">☐ ☐ ☐ Delete background </text:p>
        </text:list-item>
      </text:list>
      <text:h text:style-name="P3" text:outline-level="3"><text:bookmark text:name="objects"/>Objects</text:h>
      <text:list text:style-name="L19">
        <text:list-header>
          <text:p text:style-name="P56"><text:span text:style-name="T1">L </text:span><text:s/><text:span text:style-name="T1">M </text:span><text:s/><text:span text:style-name="T1">W</text:span> </text:p>
        </text:list-header>
        <text:list-item>
          <text:p text:style-name="P56">☐ ☐ ☐ Create new object </text:p>
        </text:list-item>
        <text:list-item>
          <text:p text:style-name="P57">☐ ☐ ☐ Assign sprite to object </text:p>
        </text:list-item>
        <text:list-item>
          <text:p text:style-name="P57">☐ ☐ ☐ Edit object properties (visible, solid, depth, persistent) </text:p>
        </text:list-item>
        <text:list-item>
          <text:p text:style-name="P57">☐ ☐ ☐ Add events to object </text:p>
        </text:list-item>
        <text:list-item>
          <text:p text:style-name="P57">☐ ☐ ☐ Add actions to events </text:p>
        </text:list-item>
        <text:list-item>
          <text:p text:style-name="P57">☐ ☐ ☐ Delete object </text:p>
        </text:list-item>
        <text:list-item>
          <text:p text:style-name="P57">☐ ☐ ☐ Duplicate object </text:p>
        </text:list-item>
        <text:list-item>
          <text:p text:style-name="P58">☐ ☐ ☐ Parent/child object relationships </text:p>
        </text:list-item>
      </text:list>
      <text:h text:style-name="P3" text:outline-level="3"><text:bookmark text:name="rooms"/>Rooms</text:h>
      <text:list text:style-name="L20">
        <text:list-header>
          <text:p text:style-name="P59"><text:span text:style-name="T1">L </text:span><text:s/><text:span text:style-name="T1">M </text:span><text:s/><text:span text:style-name="T1">W</text:span> </text:p>
        </text:list-header>
        <text:list-item>
          <text:p text:style-name="P59">☐ ☐ ☐ Create new room </text:p>
        </text:list-item>
        <text:list-item>
          <text:p text:style-name="P60">☐ ☐ ☐ Edit room properties (width, height, speed) </text:p>
        </text:list-item>
        <text:list-item>
          <text:p text:style-name="P60">☐ ☐ ☐ Set room background </text:p>
        </text:list-item>
        <text:list-item>
          <text:p text:style-name="P60">☐ ☐ ☐ Place object instances in room </text:p>
        </text:list-item>
        <text:list-item>
          <text:p text:style-name="P60">☐ ☐ ☐ Move/resize instances </text:p>
        </text:list-item>
        <text:list-item>
          <text:p text:style-name="P60">☐ ☐ ☐ Delete instances </text:p>
        </text:list-item>
        <text:list-item>
          <text:p text:style-name="P60">☐ ☐ ☐ Set room order (first room) </text:p>
        </text:list-item>
        <text:list-item>
          <text:p text:style-name="P61">☐ ☐ ☐ Delete room </text:p>
        </text:list-item>
      </text:list>
      <text:h text:style-name="P2" text:outline-level="2"><text:bookmark text:name="4-object-events-testing"/>4. Object Events Testing</text:h>
      <text:h text:style-name="P3" text:outline-level="3"><text:bookmark text:name="create-event"/>Create Event</text:h>
      <text:list text:style-name="L21">
        <text:list-header>
          <text:p text:style-name="P62"><text:span text:style-name="T1">L </text:span><text:s/><text:span text:style-name="T1">M </text:span><text:s/><text:span text:style-name="T1">W</text:span> </text:p>
        </text:list-header>
        <text:list-item>
          <text:p text:style-name="P62">☐ ☐ ☐ Add Create event </text:p>
        </text:list-item>
        <text:list-item>
          <text:p text:style-name="P63">☐ ☐ ☐ Actions execute when instance is created </text:p>
        </text:list-item>
        <text:list-item>
          <text:p text:style-name="P64">☐ ☐ ☐ Variable initialization works </text:p>
        </text:list-item>
      </text:list>
      <text:h text:style-name="P3" text:outline-level="3"><text:bookmark text:name="destroy-event"/>Destroy Event</text:h>
      <text:list text:style-name="L22">
        <text:list-header>
          <text:p text:style-name="P65"><text:span text:style-name="T1">L </text:span><text:s/><text:span text:style-name="T1">M </text:span><text:s/><text:span text:style-name="T1">W</text:span> </text:p>
        </text:list-header>
        <text:list-item>
          <text:p text:style-name="P65">☐ ☐ ☐ Add Destroy event </text:p>
        </text:list-item>
        <text:list-item>
          <text:p text:style-name="P66">☐ ☐ ☐ Actions execute when instance is destroyed </text:p>
        </text:list-item>
      </text:list>
      <text:h text:style-name="P3" text:outline-level="3"><text:bookmark text:name="step-events"/>Step Events</text:h>
      <text:list text:style-name="L23">
        <text:list-header>
          <text:p text:style-name="P67"><text:span text:style-name="T1">L </text:span><text:s/><text:span text:style-name="T1">M </text:span><text:s/><text:span text:style-name="T1">W</text:span> </text:p>
        </text:list-header>
        <text:list-item>
          <text:p text:style-name="P67">☐ ☐ ☐ Step event fires every frame </text:p>
        </text:list-item>
        <text:list-item>
          <text:p text:style-name="P68">☐ ☐ ☐ Begin Step event fires before Step </text:p>
        </text:list-item>
        <text:list-item>
          <text:p text:style-name="P69">☐ ☐ ☐ End Step event fires after Step </text:p>
        </text:list-item>
      </text:list>
      <text:h text:style-name="P3" text:outline-level="3"><text:bookmark text:name="alarm-events"/>Alarm Events</text:h>
      <text:list text:style-name="L24">
        <text:list-header>
          <text:p text:style-name="P70"><text:span text:style-name="T1">L </text:span><text:s/><text:span text:style-name="T1">M </text:span><text:s/><text:span text:style-name="T1">W</text:span> </text:p>
        </text:list-header>
        <text:list-item>
          <text:p text:style-name="P70">☐ ☐ ☐ Alarm 0-11 can be set </text:p>
        </text:list-item>
        <text:list-item>
          <text:p text:style-name="P71">☐ ☐ ☐ Alarm triggers at correct time </text:p>
        </text:list-item>
        <text:list-item>
          <text:p text:style-name="P72">☐ ☐ ☐ Alarm can be reset </text:p>
        </text:list-item>
      </text:list>
      <text:h text:style-name="P3" text:outline-level="3"><text:bookmark text:name="keyboard-events"/><text:soft-page-break/>Keyboard Events</text:h>
      <text:list text:style-name="L25">
        <text:list-header>
          <text:p text:style-name="P73"><text:span text:style-name="T1">L </text:span><text:s/><text:span text:style-name="T1">M </text:span><text:s/><text:span text:style-name="T1">W</text:span> </text:p>
        </text:list-header>
        <text:list-item>
          <text:p text:style-name="P73">☐ ☐ ☐ Key Press event (fires once on key down) </text:p>
        </text:list-item>
        <text:list-item>
          <text:p text:style-name="P74">☐ ☐ ☐ Key Release event (fires once on key up) </text:p>
        </text:list-item>
        <text:list-item>
          <text:p text:style-name="P74">☐ ☐ ☐ Key Down event (fires continuously while held) </text:p>
        </text:list-item>
        <text:list-item>
          <text:p text:style-name="P74">☐ ☐ ☐ Specific key detection (Arrow keys, WASD, Space, Enter, etc.) </text:p>
        </text:list-item>
        <text:list-item>
          <text:p text:style-name="P75">☐ ☐ ☐ Any key detection </text:p>
        </text:list-item>
      </text:list>
      <text:h text:style-name="P3" text:outline-level="3"><text:bookmark text:name="mouse-events"/>Mouse Events</text:h>
      <text:list text:style-name="L26">
        <text:list-header>
          <text:p text:style-name="P76"><text:span text:style-name="T1">L </text:span><text:s/><text:span text:style-name="T1">M </text:span><text:s/><text:span text:style-name="T1">W</text:span> </text:p>
        </text:list-header>
        <text:list-item>
          <text:p text:style-name="P76">☐ ☐ ☐ Left button press/release/down </text:p>
        </text:list-item>
        <text:list-item>
          <text:p text:style-name="P77">☐ ☐ ☐ Right button press/release/down </text:p>
        </text:list-item>
        <text:list-item>
          <text:p text:style-name="P77">☐ ☐ ☐ Middle button press/release/down </text:p>
        </text:list-item>
        <text:list-item>
          <text:p text:style-name="P77">☐ ☐ ☐ Mouse enter (cursor enters instance) </text:p>
        </text:list-item>
        <text:list-item>
          <text:p text:style-name="P77">☐ ☐ ☐ Mouse leave (cursor leaves instance) </text:p>
        </text:list-item>
        <text:list-item>
          <text:p text:style-name="P78">☐ ☐ ☐ Global mouse events (anywhere on screen) </text:p>
        </text:list-item>
      </text:list>
      <text:h text:style-name="P3" text:outline-level="3"><text:bookmark text:name="collision-events"/>Collision Events</text:h>
      <text:list text:style-name="L27">
        <text:list-header>
          <text:p text:style-name="P79"><text:span text:style-name="T1">L </text:span><text:s/><text:span text:style-name="T1">M </text:span><text:s/><text:span text:style-name="T1">W</text:span> </text:p>
        </text:list-header>
        <text:list-item>
          <text:p text:style-name="P79">☐ ☐ ☐ Collision with specific object </text:p>
        </text:list-item>
        <text:list-item>
          <text:p text:style-name="P80">☐ ☐ ☐ Collision detection accuracy </text:p>
        </text:list-item>
        <text:list-item>
          <text:p text:style-name="P81">☐ ☐ ☐ Multiple collision events on same object </text:p>
        </text:list-item>
      </text:list>
      <text:h text:style-name="P3" text:outline-level="3"><text:bookmark text:name="other-events"/>Other Events</text:h>
      <text:list text:style-name="L28">
        <text:list-header>
          <text:p text:style-name="P82"><text:span text:style-name="T1">L </text:span><text:s/><text:span text:style-name="T1">M </text:span><text:s/><text:span text:style-name="T1">W</text:span> </text:p>
        </text:list-header>
        <text:list-item>
          <text:p text:style-name="P82">☐ ☐ ☐ Outside Room event </text:p>
        </text:list-item>
        <text:list-item>
          <text:p text:style-name="P83">☐ ☐ ☐ Intersect Boundary event </text:p>
        </text:list-item>
        <text:list-item>
          <text:p text:style-name="P83">☐ ☐ ☐ Game Start event </text:p>
        </text:list-item>
        <text:list-item>
          <text:p text:style-name="P83">☐ ☐ ☐ Game End event </text:p>
        </text:list-item>
        <text:list-item>
          <text:p text:style-name="P83">☐ ☐ ☐ Room Start event </text:p>
        </text:list-item>
        <text:list-item>
          <text:p text:style-name="P83">☐ ☐ ☐ Room End event </text:p>
        </text:list-item>
        <text:list-item>
          <text:p text:style-name="P83">☐ ☐ ☐ Animation End event </text:p>
        </text:list-item>
        <text:list-item>
          <text:p text:style-name="P84">☐ ☐ ☐ User-defined events </text:p>
        </text:list-item>
      </text:list>
      <text:h text:style-name="P3" text:outline-level="3"><text:bookmark text:name="draw-events"/>Draw Events</text:h>
      <text:list text:style-name="L29">
        <text:list-header>
          <text:p text:style-name="P85"><text:span text:style-name="T1">L </text:span><text:s/><text:span text:style-name="T1">M </text:span><text:s/><text:span text:style-name="T1">W</text:span> </text:p>
        </text:list-header>
        <text:list-item>
          <text:p text:style-name="P85">☐ ☐ ☐ Draw event overrides default sprite drawing </text:p>
        </text:list-item>
        <text:list-item>
          <text:p text:style-name="P86">☐ ☐ ☐ Draw GUI event for HUD elements </text:p>
        </text:list-item>
        <text:list-item>
          <text:p text:style-name="P87">☐ ☐ ☐ Draw Begin/End events </text:p>
        </text:list-item>
      </text:list>
      <text:h text:style-name="P2" text:outline-level="2"><text:bookmark text:name="5-actions-testing"/>5. Actions Testing</text:h>
      <text:h text:style-name="P3" text:outline-level="3"><text:bookmark text:name="movement-actions"/>Movement Actions</text:h>
      <text:list text:style-name="L30">
        <text:list-header>
          <text:p text:style-name="P88"><text:span text:style-name="T1">L </text:span><text:s/><text:span text:style-name="T1">M </text:span><text:s/><text:span text:style-name="T1">W</text:span> </text:p>
        </text:list-header>
        <text:list-item>
          <text:p text:style-name="P88">☐ ☐ ☐ Move Fixed (8 directions + stop) </text:p>
        </text:list-item>
        <text:list-item>
          <text:p text:style-name="P89">☐ ☐ ☐ Move Free (direction + speed) </text:p>
        </text:list-item>
        <text:list-item>
          <text:p text:style-name="P89">☐ ☐ ☐ Move Towards (target point) </text:p>
        </text:list-item>
        <text:list-item>
          <text:p text:style-name="P89">☐ ☐ ☐ Set Speed </text:p>
        </text:list-item>
        <text:list-item>
          <text:p text:style-name="P89">☐ ☐ ☐ Set Direction </text:p>
        </text:list-item>
        <text:list-item>
          <text:p text:style-name="P89">☐ ☐ ☐ Set Horizontal Speed (hspeed) </text:p>
        </text:list-item>
        <text:list-item>
          <text:p text:style-name="P89">☐ ☐ ☐ Set Vertical Speed (vspeed) </text:p>
        </text:list-item>
        <text:list-item>
          <text:p text:style-name="P89">☐ ☐ ☐ Reverse Horizontal </text:p>
        </text:list-item>
        <text:list-item>
          <text:p text:style-name="P89">☐ ☐ ☐ Reverse Vertical </text:p>
        </text:list-item>
        <text:list-item>
          <text:p text:style-name="P89">☐ ☐ ☐ Set Gravity </text:p>
        </text:list-item>
        <text:list-item>
          <text:p text:style-name="P89">☐ ☐ ☐ Set Friction </text:p>
        </text:list-item>
      </text:list>
      <text:p text:style-name="P90"/>
      <text:h text:style-name="P91" text:outline-level="3"><text:bookmark text:name="movement-actions Copie 1"/>Movement Actions <text:span text:style-name="T2">(cont.)</text:span></text:h>
      <text:list text:continue-numbering="true" text:style-name="L30">
        <text:list-header>
          <text:p text:style-name="P92"><text:span text:style-name="T1">L </text:span><text:s/><text:span text:style-name="T1">M </text:span><text:s/><text:span text:style-name="T1">W</text:span> </text:p>
        </text:list-header>
        <text:list-item>
          <text:p text:style-name="P92">☐ ☐ ☐ Jump to Position </text:p>
        </text:list-item>
        <text:list-item>
          <text:p text:style-name="P89">☐ ☐ ☐ Jump to Start Position </text:p>
        </text:list-item>
        <text:list-item>
          <text:p text:style-name="P89">☐ ☐ ☐ Jump to Random Position </text:p>
        </text:list-item>
        <text:list-item>
          <text:p text:style-name="P89">☐ ☐ ☐ Snap to Grid </text:p>
        </text:list-item>
        <text:list-item>
          <text:p text:style-name="P89">☐ ☐ ☐ Wrap Screen </text:p>
        </text:list-item>
        <text:list-item>
          <text:p text:style-name="P89">☐ ☐ ☐ Move to Contact </text:p>
        </text:list-item>
        <text:list-item>
          <text:p text:style-name="P93">☐ ☐ ☐ Bounce against objects </text:p>
        </text:list-item>
      </text:list>
      <text:h text:style-name="P3" text:outline-level="3"><text:bookmark text:name="instance-actions"/>Instance Actions</text:h>
      <text:list text:style-name="L31">
        <text:list-header>
          <text:p text:style-name="P94"><text:span text:style-name="T1">L </text:span><text:s/><text:span text:style-name="T1">M </text:span><text:s/><text:span text:style-name="T1">W</text:span> </text:p>
        </text:list-header>
        <text:list-item>
          <text:p text:style-name="P94">☐ ☐ ☐ Create Instance </text:p>
        </text:list-item>
        <text:list-item>
          <text:p text:style-name="P95">☐ ☐ ☐ Create Instance with Motion </text:p>
        </text:list-item>
        <text:list-item>
          <text:p text:style-name="P95">☐ ☐ ☐ Create Random Instance </text:p>
        </text:list-item>
        <text:list-item>
          <text:p text:style-name="P95">☐ ☐ ☐ Change Instance (transform to different object) </text:p>
        </text:list-item>
        <text:list-item>
          <text:p text:style-name="P95">☐ ☐ ☐ Destroy Instance </text:p>
        </text:list-item>
        <text:list-item>
          <text:p text:style-name="P96">☐ ☐ ☐ Destroy at Position </text:p>
        </text:list-item>
      </text:list>
      <text:h text:style-name="P3" text:outline-level="3"><text:bookmark text:name="control-flow-actions"/>Control Flow Actions</text:h>
      <text:list text:style-name="L32">
        <text:list-header>
          <text:p text:style-name="P97"><text:span text:style-name="T1">L </text:span><text:s/><text:span text:style-name="T1">M </text:span><text:s/><text:span text:style-name="T1">W</text:span> </text:p>
        </text:list-header>
        <text:list-item>
          <text:p text:style-name="P97">☐ ☐ ☐ If Variable (comparison) </text:p>
        </text:list-item>
        <text:list-item>
          <text:p text:style-name="P98">☐ ☐ ☐ If Instance Count </text:p>
        </text:list-item>
        <text:list-item>
          <text:p text:style-name="P98">☐ ☐ ☐ If Dice (random chance) </text:p>
        </text:list-item>
        <text:list-item>
          <text:p text:style-name="P98">☐ ☐ ☐ If Question (user prompt) </text:p>
        </text:list-item>
        <text:list-item>
          <text:p text:style-name="P98">☐ ☐ ☐ If Expression </text:p>
        </text:list-item>
        <text:list-item>
          <text:p text:style-name="P98">☐ ☐ ☐ If Mouse Button </text:p>
        </text:list-item>
        <text:list-item>
          <text:p text:style-name="P98">☐ ☐ ☐ If Instance Aligned with Grid </text:p>
        </text:list-item>
        <text:list-item>
          <text:p text:style-name="P98">☐ ☐ ☐ Start Block / End Block </text:p>
        </text:list-item>
        <text:list-item>
          <text:p text:style-name="P98">☐ ☐ ☐ Else </text:p>
        </text:list-item>
        <text:list-item>
          <text:p text:style-name="P98">☐ ☐ ☐ Exit Event </text:p>
        </text:list-item>
        <text:list-item>
          <text:p text:style-name="P98">☐ ☐ ☐ Repeat </text:p>
        </text:list-item>
        <text:list-item>
          <text:p text:style-name="P99">☐ ☐ ☐ Call Parent Event </text:p>
        </text:list-item>
      </text:list>
      <text:h text:style-name="P3" text:outline-level="3"><text:bookmark text:name="room-actions"/>Room Actions</text:h>
      <text:list text:style-name="L33">
        <text:list-header>
          <text:p text:style-name="P100"><text:span text:style-name="T1">L </text:span><text:s/><text:span text:style-name="T1">M </text:span><text:s/><text:span text:style-name="T1">W</text:span> </text:p>
        </text:list-header>
        <text:list-item>
          <text:p text:style-name="P100">☐ ☐ ☐ Go to Next Room </text:p>
        </text:list-item>
        <text:list-item>
          <text:p text:style-name="P101">☐ ☐ ☐ Go to Previous Room </text:p>
        </text:list-item>
        <text:list-item>
          <text:p text:style-name="P101">☐ ☐ ☐ Restart Room </text:p>
        </text:list-item>
        <text:list-item>
          <text:p text:style-name="P101">☐ ☐ ☐ Go to Room (specific) </text:p>
        </text:list-item>
        <text:list-item>
          <text:p text:style-name="P101">☐ ☐ ☐ If Previous Room Exists </text:p>
        </text:list-item>
        <text:list-item>
          <text:p text:style-name="P102">☐ ☐ ☐ If Next Room Exists </text:p>
        </text:list-item>
      </text:list>
      <text:h text:style-name="P3" text:outline-level="3"><text:bookmark text:name="variable-actions"/>Variable Actions</text:h>
      <text:list text:style-name="L34">
        <text:list-header>
          <text:p text:style-name="P103"><text:span text:style-name="T1">L </text:span><text:s/><text:span text:style-name="T1">M </text:span><text:s/><text:span text:style-name="T1">W</text:span> </text:p>
        </text:list-header>
        <text:list-item>
          <text:p text:style-name="P103">☐ ☐ ☐ Set Variable </text:p>
        </text:list-item>
        <text:list-item>
          <text:p text:style-name="P104">☐ ☐ ☐ If Variable </text:p>
        </text:list-item>
        <text:list-item>
          <text:p text:style-name="P105">☐ ☐ ☐ Draw Variable </text:p>
        </text:list-item>
      </text:list>
      <text:h text:style-name="P3" text:outline-level="3"><text:bookmark text:name="scoreliveshealth-actions"/>Score/Lives/Health Actions</text:h>
      <text:list text:style-name="L35">
        <text:list-header>
          <text:p text:style-name="P106"><text:span text:style-name="T1">L </text:span><text:s/><text:span text:style-name="T1">M </text:span><text:s/><text:span text:style-name="T1">W</text:span> </text:p>
        </text:list-header>
        <text:list-item>
          <text:p text:style-name="P106">☐ ☐ ☐ Set Score </text:p>
        </text:list-item>
        <text:list-item>
          <text:p text:style-name="P107">☐ ☐ ☐ If Score </text:p>
        </text:list-item>
        <text:list-item>
          <text:p text:style-name="P107">☐ ☐ ☐ Draw Score </text:p>
        </text:list-item>
        <text:list-item>
          <text:p text:style-name="P107">☐ ☐ ☐ Set Lives </text:p>
        </text:list-item>
        <text:list-item>
          <text:p text:style-name="P107">☐ ☐ ☐ If Lives </text:p>
        </text:list-item>
      </text:list>
      <text:h text:style-name="P91" text:outline-level="3"><text:bookmark text:name="scoreliveshealth-actions Copie 1"/>Score/Lives/Health Actions <text:span text:style-name="T2">(cont.)</text:span></text:h>
      <text:list text:continue-numbering="true" text:style-name="L35">
        <text:list-header>
          <text:p text:style-name="P108"><text:span text:style-name="T1">L </text:span><text:s/><text:span text:style-name="T1">M </text:span><text:s/><text:span text:style-name="T1">W</text:span> </text:p>
        </text:list-header>
        <text:list-item>
          <text:p text:style-name="P108">☐ ☐ ☐ Draw Lives </text:p>
        </text:list-item>
        <text:list-item>
          <text:p text:style-name="P107">☐ ☐ ☐ Set Health </text:p>
        </text:list-item>
        <text:list-item>
          <text:p text:style-name="P107">☐ ☐ ☐ If Health </text:p>
        </text:list-item>
        <text:list-item>
          <text:p text:style-name="P107">☐ ☐ ☐ Draw Health </text:p>
        </text:list-item>
        <text:list-item>
          <text:p text:style-name="P109">☐ ☐ ☐ Draw Health Bar </text:p>
        </text:list-item>
      </text:list>
      <text:h text:style-name="P3" text:outline-level="3"><text:bookmark text:name="drawing-actions"/>Drawing Actions</text:h>
      <text:list text:style-name="L36">
        <text:list-header>
          <text:p text:style-name="P110"><text:span text:style-name="T1">L </text:span><text:s/><text:span text:style-name="T1">M </text:span><text:s/><text:span text:style-name="T1">W</text:span> </text:p>
        </text:list-header>
        <text:list-item>
          <text:p text:style-name="P110">☐ ☐ ☐ Draw Sprite </text:p>
        </text:list-item>
        <text:list-item>
          <text:p text:style-name="P111">☐ ☐ ☐ Draw Background </text:p>
        </text:list-item>
        <text:list-item>
          <text:p text:style-name="P111">☐ ☐ ☐ Draw Text </text:p>
        </text:list-item>
        <text:list-item>
          <text:p text:style-name="P111">☐ ☐ ☐ Draw Text Transformed </text:p>
        </text:list-item>
        <text:list-item>
          <text:p text:style-name="P111">☐ ☐ ☐ Draw Rectangle </text:p>
        </text:list-item>
        <text:list-item>
          <text:p text:style-name="P111">☐ ☐ ☐ Draw Ellipse </text:p>
        </text:list-item>
        <text:list-item>
          <text:p text:style-name="P111">☐ ☐ ☐ Draw Line </text:p>
        </text:list-item>
        <text:list-item>
          <text:p text:style-name="P111">☐ ☐ ☐ Draw Arrow </text:p>
        </text:list-item>
        <text:list-item>
          <text:p text:style-name="P111">☐ ☐ ☐ Set Color </text:p>
        </text:list-item>
        <text:list-item>
          <text:p text:style-name="P111">☐ ☐ ☐ Set Font </text:p>
        </text:list-item>
        <text:list-item>
          <text:p text:style-name="P112">☐ ☐ ☐ Set Full Screen </text:p>
        </text:list-item>
      </text:list>
      <text:h text:style-name="P3" text:outline-level="3"><text:bookmark text:name="sound-actions"/>Sound Actions</text:h>
      <text:list text:style-name="L37">
        <text:list-header>
          <text:p text:style-name="P113"><text:span text:style-name="T1">L </text:span><text:s/><text:span text:style-name="T1">M </text:span><text:s/><text:span text:style-name="T1">W</text:span> </text:p>
        </text:list-header>
        <text:list-item>
          <text:p text:style-name="P113">☐ ☐ ☐ Play Sound </text:p>
        </text:list-item>
        <text:list-item>
          <text:p text:style-name="P114">☐ ☐ ☐ Stop Sound </text:p>
        </text:list-item>
        <text:list-item>
          <text:p text:style-name="P114">☐ ☐ ☐ If Sound Playing </text:p>
        </text:list-item>
        <text:list-item>
          <text:p text:style-name="P114">☐ ☐ ☐ Set Volume </text:p>
        </text:list-item>
        <text:list-item>
          <text:p text:style-name="P115">☐ ☐ ☐ Set Pan </text:p>
        </text:list-item>
      </text:list>
      <text:h text:style-name="P3" text:outline-level="3"><text:bookmark text:name="timing-actions"/>Timing Actions</text:h>
      <text:list text:style-name="L38">
        <text:list-header>
          <text:p text:style-name="P116"><text:span text:style-name="T1">L </text:span><text:s/><text:span text:style-name="T1">M </text:span><text:s/><text:span text:style-name="T1">W</text:span> </text:p>
        </text:list-header>
        <text:list-item>
          <text:p text:style-name="P116">☐ ☐ ☐ Set Alarm </text:p>
        </text:list-item>
        <text:list-item>
          <text:p text:style-name="P117">☐ ☐ ☐ Sleep (pause execution) </text:p>
        </text:list-item>
        <text:list-item>
          <text:p text:style-name="P118">☐ ☐ ☐ Set Timeline </text:p>
        </text:list-item>
      </text:list>
      <text:h text:style-name="P3" text:outline-level="3"><text:bookmark text:name="infogame-actions"/>Info/Game Actions</text:h>
      <text:list text:style-name="L39">
        <text:list-header>
          <text:p text:style-name="P119"><text:span text:style-name="T1">L </text:span><text:s/><text:span text:style-name="T1">M </text:span><text:s/><text:span text:style-name="T1">W</text:span> </text:p>
        </text:list-header>
        <text:list-item>
          <text:p text:style-name="P119">☐ ☐ ☐ Display Message </text:p>
        </text:list-item>
        <text:list-item>
          <text:p text:style-name="P120">☐ ☐ ☐ Show Info </text:p>
        </text:list-item>
        <text:list-item>
          <text:p text:style-name="P120">☐ ☐ ☐ Show Video </text:p>
        </text:list-item>
        <text:list-item>
          <text:p text:style-name="P120">☐ ☐ ☐ Restart Game </text:p>
        </text:list-item>
        <text:list-item>
          <text:p text:style-name="P120">☐ ☐ ☐ End Game </text:p>
        </text:list-item>
        <text:list-item>
          <text:p text:style-name="P120">☐ ☐ ☐ Save Game </text:p>
        </text:list-item>
        <text:list-item>
          <text:p text:style-name="P121">☐ ☐ ☐ Load Game </text:p>
        </text:list-item>
      </text:list>
      <text:h text:style-name="P2" text:outline-level="2"><text:bookmark text:name="6-room-editor"/>6. Room Editor</text:h>
      <text:list text:style-name="L40">
        <text:list-header>
          <text:p text:style-name="P122"><text:span text:style-name="T1">L </text:span><text:s/><text:span text:style-name="T1">M </text:span><text:s/><text:span text:style-name="T1">W</text:span> </text:p>
        </text:list-header>
        <text:list-item>
          <text:p text:style-name="P122">☐ ☐ ☐ Grid display toggle </text:p>
        </text:list-item>
        <text:list-item>
          <text:p text:style-name="P123">☐ ☐ ☐ Grid snap toggle </text:p>
        </text:list-item>
        <text:list-item>
          <text:p text:style-name="P123">☐ ☐ ☐ Zoom in/out </text:p>
        </text:list-item>
        <text:list-item>
          <text:p text:style-name="P123">☐ ☐ ☐ Pan/scroll room view </text:p>
        </text:list-item>
        <text:list-item>
          <text:p text:style-name="P123">☐ ☐ ☐ Instance placement </text:p>
        </text:list-item>
        <text:list-item>
          <text:p text:style-name="P123">☐ ☐ ☐ Instance selection (click) </text:p>
        </text:list-item>
        <text:list-item>
          <text:p text:style-name="P123">☐ ☐ ☐ Multi-select instances (Ctrl+click or drag box) </text:p>
        </text:list-item>
      </text:list>
      <text:h text:style-name="P124" text:outline-level="3"><text:bookmark text:name="run-game-f5 Copie 1"/><text:soft-page-break/>R<text:span text:style-name="T2">oom Editor</text:span> (<text:span text:style-name="T2">cont.</text:span>)</text:h>
      <text:list text:continue-numbering="true" text:style-name="L40">
        <text:list-header>
          <text:p text:style-name="P125"><text:span text:style-name="T1">L </text:span><text:s/><text:span text:style-name="T1">M </text:span><text:s/><text:span text:style-name="T1">W</text:span> </text:p>
        </text:list-header>
        <text:list-item>
          <text:p text:style-name="P125">☐ ☐ ☐ Move selected instances </text:p>
        </text:list-item>
        <text:list-item>
          <text:p text:style-name="P123">☐ ☐ ☐ Delete selected instances (Delete key) </text:p>
        </text:list-item>
        <text:list-item>
          <text:p text:style-name="P123">☐ ☐ ☐ Copy/paste instances </text:p>
        </text:list-item>
        <text:list-item>
          <text:p text:style-name="P123">☐ ☐ ☐ Instance properties panel </text:p>
        </text:list-item>
        <text:list-item>
          <text:p text:style-name="P123">☐ ☐ ☐ Layer management (if applicable) </text:p>
        </text:list-item>
        <text:list-item>
          <text:p text:style-name="P123">☐ ☐ ☐ Background layer editing </text:p>
        </text:list-item>
        <text:list-item>
          <text:p text:style-name="P126">☐ ☐ ☐ View settings (show/hide elements) </text:p>
        </text:list-item>
      </text:list>
      <text:h text:style-name="P2" text:outline-level="2"><text:bookmark text:name="7-blockly-visual-programming"/>7. Blockly Visual Programming</text:h>
      <text:list text:style-name="L41">
        <text:list-header>
          <text:p text:style-name="P127"><text:span text:style-name="T1">L </text:span><text:s/><text:span text:style-name="T1">M </text:span><text:s/><text:span text:style-name="T1">W</text:span> </text:p>
        </text:list-header>
        <text:list-item>
          <text:p text:style-name="P127">☐ ☐ ☐ Blockly editor opens for actions </text:p>
        </text:list-item>
        <text:list-item>
          <text:p text:style-name="P128">☐ ☐ ☐ Blocks can be dragged from toolbox </text:p>
        </text:list-item>
        <text:list-item>
          <text:p text:style-name="P128">☐ ☐ ☐ Blocks snap together correctly </text:p>
        </text:list-item>
        <text:list-item>
          <text:p text:style-name="P128">☐ ☐ ☐ Block deletion works </text:p>
        </text:list-item>
        <text:list-item>
          <text:p text:style-name="P128">☐ ☐ ☐ Undo/redo in Blockly </text:p>
        </text:list-item>
        <text:list-item>
          <text:p text:style-name="P128">☐ ☐ ☐ Code generation from blocks </text:p>
        </text:list-item>
        <text:list-item>
          <text:p text:style-name="P128">☐ ☐ ☐ All action categories available in toolbox </text:p>
        </text:list-item>
        <text:list-item>
          <text:p text:style-name="P129">☐ ☐ ☐ Custom blocks (if any) </text:p>
        </text:list-item>
      </text:list>
      <text:h text:style-name="P2" text:outline-level="2"><text:bookmark text:name="8-code-editor"/>8. Code Editor</text:h>
      <text:list text:style-name="L42">
        <text:list-header>
          <text:p text:style-name="P130"><text:span text:style-name="T1">L </text:span><text:s/><text:span text:style-name="T1">M </text:span><text:s/><text:span text:style-name="T1">W</text:span> </text:p>
        </text:list-header>
        <text:list-item>
          <text:p text:style-name="P130">☐ ☐ ☐ Python code editor opens </text:p>
        </text:list-item>
        <text:list-item>
          <text:p text:style-name="P131">☐ ☐ ☐ Syntax highlighting works </text:p>
        </text:list-item>
        <text:list-item>
          <text:p text:style-name="P131">☐ ☐ ☐ Code completion (if available) </text:p>
        </text:list-item>
        <text:list-item>
          <text:p text:style-name="P131">☐ ☐ ☐ Code can be saved </text:p>
        </text:list-item>
        <text:list-item>
          <text:p text:style-name="P132">☐ ☐ ☐ Code executes correctly in game </text:p>
        </text:list-item>
      </text:list>
      <text:h text:style-name="P2" text:outline-level="2"><text:bookmark text:name="9-game-execution"/>9. Game Execution</text:h>
      <text:h text:style-name="P3" text:outline-level="3"><text:bookmark text:name="run-game-f5"/>Run Game (F5)</text:h>
      <text:list text:style-name="L43">
        <text:list-header>
          <text:p text:style-name="P133"><text:span text:style-name="T1">L </text:span><text:s/><text:span text:style-name="T1">M </text:span><text:s/><text:span text:style-name="T1">W</text:span> </text:p>
        </text:list-header>
        <text:list-item>
          <text:p text:style-name="P133">☐ ☐ ☐ Game window opens </text:p>
        </text:list-item>
        <text:list-item>
          <text:p text:style-name="P134">☐ ☐ ☐ First room loads correctly </text:p>
        </text:list-item>
        <text:list-item>
          <text:p text:style-name="P134">☐ ☐ ☐ Objects appear at correct positions </text:p>
        </text:list-item>
        <text:list-item>
          <text:p text:style-name="P134">☐ ☐ ☐ Sprites display correctly </text:p>
        </text:list-item>
        <text:list-item>
          <text:p text:style-name="P134">☐ ☐ ☐ Animations play </text:p>
        </text:list-item>
        <text:list-item>
          <text:p text:style-name="P134">☐ ☐ ☐ Events fire correctly </text:p>
        </text:list-item>
        <text:list-item>
          <text:p text:style-name="P134">☐ ☐ ☐ Collisions detected </text:p>
        </text:list-item>
        <text:list-item>
          <text:p text:style-name="P134">☐ ☐ ☐ Keyboard input works </text:p>
        </text:list-item>
        <text:list-item>
          <text:p text:style-name="P134">☐ ☐ ☐ Mouse input works </text:p>
        </text:list-item>
        <text:list-item>
          <text:p text:style-name="P134">☐ ☐ ☐ Sound plays </text:p>
        </text:list-item>
        <text:list-item>
          <text:p text:style-name="P134">☐ ☐ ☐ Room transitions work </text:p>
        </text:list-item>
        <text:list-item>
          <text:p text:style-name="P135">☐ ☐ ☐ Game can be closed cleanly </text:p>
        </text:list-item>
      </text:list>
      <text:h text:style-name="P3" text:outline-level="3"><text:bookmark text:name="debug-mode"/>Debug Mode</text:h>
      <text:list text:style-name="L44">
        <text:list-header>
          <text:p text:style-name="P136"><text:span text:style-name="T1">L </text:span><text:s/><text:span text:style-name="T1">M </text:span><text:s/><text:span text:style-name="T1">W</text:span> </text:p>
        </text:list-header>
        <text:list-item>
          <text:p text:style-name="P136">☐ ☐ ☐ Debug output visible </text:p>
        </text:list-item>
        <text:list-item>
          <text:p text:style-name="P137">☐ ☐ ☐ FPS display (if enabled) </text:p>
        </text:list-item>
        <text:list-item>
          <text:p text:style-name="P137">☐ ☐ ☐ Variable inspection (if available) </text:p>
        </text:list-item>
        <text:list-item>
          <text:p text:style-name="P138">☐ ☐ ☐ Step-through execution (if available) </text:p>
        </text:list-item>
      </text:list>
      <text:h text:style-name="P2" text:outline-level="2"><text:bookmark text:name="10-exportbuild"/><text:soft-page-break/>10. Export/Build</text:h>
      <text:h text:style-name="P3" text:outline-level="3"><text:bookmark text:name="html5-export"/>HTML5 Export</text:h>
      <text:list text:style-name="L45">
        <text:list-header>
          <text:p text:style-name="P139"><text:span text:style-name="T1">L </text:span><text:s/><text:span text:style-name="T1">M </text:span><text:s/><text:span text:style-name="T1">W</text:span> </text:p>
        </text:list-header>
        <text:list-item>
          <text:p text:style-name="P139">☐ ☐ ☐ Export to HTML5 works </text:p>
        </text:list-item>
        <text:list-item>
          <text:p text:style-name="P140">☐ ☐ ☐ Game runs in browser </text:p>
        </text:list-item>
        <text:list-item>
          <text:p text:style-name="P141">☐ ☐ ☐ All features work in browser </text:p>
        </text:list-item>
      </text:list>
      <text:h text:style-name="P3" text:outline-level="3"><text:bookmark text:name="standalone-export"/>Standalone Export</text:h>
      <text:list text:style-name="L46">
        <text:list-header>
          <text:p text:style-name="P142"><text:span text:style-name="T1">L </text:span><text:s/><text:span text:style-name="T1">M </text:span><text:s/><text:span text:style-name="T1">W</text:span> </text:p>
        </text:list-header>
        <text:list-item>
          <text:p text:style-name="P142">☐ ☐ ☐ Export to executable works </text:p>
        </text:list-item>
        <text:list-item>
          <text:p text:style-name="P143">☐ ☐ ☐ Game runs without IDE </text:p>
        </text:list-item>
        <text:list-item>
          <text:p text:style-name="P144">☐ ☐ ☐ All assets bundled correctly </text:p>
        </text:list-item>
      </text:list>
      <text:h text:style-name="P2" text:outline-level="2"><text:bookmark text:name="11-preferencessettings"/>11. Preferences/Settings</text:h>
      <text:list text:style-name="L47">
        <text:list-header>
          <text:p text:style-name="P145"><text:span text:style-name="T1">L </text:span><text:s/><text:span text:style-name="T1">M </text:span><text:s/><text:span text:style-name="T1">W</text:span> </text:p>
        </text:list-header>
        <text:list-item>
          <text:p text:style-name="P145">☐ ☐ ☐ Preferences dialog opens </text:p>
        </text:list-item>
        <text:list-item>
          <text:p text:style-name="P146">☐ ☐ ☐ Language selection works </text:p>
        </text:list-item>
        <text:list-item>
          <text:p text:style-name="P146">☐ ☐ ☐ Theme selection works (light/dark) </text:p>
        </text:list-item>
        <text:list-item>
          <text:p text:style-name="P146">☐ ☐ ☐ Font settings work </text:p>
        </text:list-item>
        <text:list-item>
          <text:p text:style-name="P146">☐ ☐ ☐ Grid settings persist </text:p>
        </text:list-item>
        <text:list-item>
          <text:p text:style-name="P147">☐ ☐ ☐ Settings save between sessions </text:p>
        </text:list-item>
      </text:list>
      <text:h text:style-name="P2" text:outline-level="2"><text:bookmark text:name="12-help-system"/>12. Help System</text:h>
      <text:list text:style-name="L48">
        <text:list-item>
          <text:p text:style-name="P148">☐ ☐ ☐ Help menu accessible </text:p>
        </text:list-item>
        <text:list-item>
          <text:p text:style-name="P148">☐ ☐ ☐ Documentation opens </text:p>
        </text:list-item>
        <text:list-item>
          <text:p text:style-name="P148">☐ ☐ ☐ About dialog shows version info </text:p>
        </text:list-item>
        <text:list-item>
          <text:p text:style-name="P149">☐ ☐ ☐ Links work (website, GitHub, etc.) </text:p>
        </text:list-item>
      </text:list>
      <text:h text:style-name="P2" text:outline-level="2"><text:bookmark text:name="13-standalone-executable-testing"/>13. Standalone Executable Testing</text:h>
      <text:list text:style-name="L49">
        <text:list-header>
          <text:p text:style-name="P150"><text:span text:style-name="T1">L </text:span><text:s/><text:span text:style-name="T1">M </text:span><text:s/><text:span text:style-name="T1">W</text:span> </text:p>
        </text:list-header>
        <text:list-item>
          <text:p text:style-name="P150">☐ ☐ ☐ Application launches from executable </text:p>
        </text:list-item>
        <text:list-item>
          <text:p text:style-name="P151">☐ ☐ ☐ No empty directories created in launch folder </text:p>
        </text:list-item>
        <text:list-item>
          <text:p text:style-name="P151">☐ ☐ ☐ Projects can be created/opened </text:p>
        </text:list-item>
        <text:list-item>
          <text:p text:style-name="P151">☐ ☐ ☐ Games can be run (F5) </text:p>
        </text:list-item>
        <text:list-item>
          <text:p text:style-name="P151">☐ ☐ ☐ Room preview shows appropriate message </text:p>
        </text:list-item>
        <text:list-item>
          <text:p text:style-name="P151">☐ ☐ ☐ All UI elements render correctly </text:p>
        </text:list-item>
        <text:list-item>
          <text:p text:style-name="P152">☐ ☐ ☐ No Python-related errors in console </text:p>
        </text:list-item>
      </text:list>
      <text:h text:style-name="P2" text:outline-level="2"><text:bookmark text:name="14-error-handling"/>14. Error Handling</text:h>
      <text:list text:style-name="L50">
        <text:list-header>
          <text:p text:style-name="P153"><text:span text:style-name="T1">L </text:span><text:s/><text:span text:style-name="T1">M </text:span><text:s/><text:span text:style-name="T1">W</text:span> </text:p>
        </text:list-header>
        <text:list-item>
          <text:p text:style-name="P153">☐ ☐ ☐ Invalid project file shows error message </text:p>
        </text:list-item>
        <text:list-item>
          <text:p text:style-name="P154">☐ ☐ ☐ Missing asset references handled gracefully </text:p>
        </text:list-item>
        <text:list-item>
          <text:p text:style-name="P154">☐ ☐ ☐ Syntax errors in code show helpful messages </text:p>
        </text:list-item>
        <text:list-item>
          <text:p text:style-name="P154">☐ ☐ ☐ Crash recovery (autosave, if available) </text:p>
        </text:list-item>
        <text:list-item>
          <text:p text:style-name="P155">☐ ☐ ☐ Undo works after errors </text:p>
        </text:list-item>
      </text:list>
      <text:p text:style-name="Horizontal_20_Line"/>
      <text:p text:style-name="P156"/>
      <text:h text:style-name="P2" text:outline-level="2"><text:bookmark text:name="test-environment-notes"/>Test Environment Notes</text:h>
      <text:p text:style-name="Text_20_body"><text:span text:style-name="Strong_20_Emphasis">Date Tested:</text:span> <text:span text:style-name="Strong_20_Emphasis"><text:span text:style-name="Emphasis">__</text:span></text:span>_</text:p>
      <text:p text:style-name="Text_20_body"><text:span text:style-name="Strong_20_Emphasis">Version:</text:span> <text:span text:style-name="Strong_20_Emphasis"><text:span text:style-name="Emphasis">__</text:span></text:span>_</text:p>
      <text:p text:style-name="Text_20_body"><text:span text:style-name="Strong_20_Emphasis">OS:</text:span> <text:span text:style-name="Strong_20_Emphasis"><text:span text:style-name="Emphasis">__</text:span></text:span>_</text:p>
      <text:p text:style-name="Text_20_body"><text:span text:style-name="Strong_20_Emphasis">Tester:</text:span> <text:span text:style-name="Strong_20_Emphasis"><text:span text:style-name="Emphasis">__</text:span></text:span>_</text:p>
      <text:p text:style-name="Text_20_body"><text:span text:style-name="Strong_20_Emphasis">Note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CH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Times New Roman" fo:font-size="12pt" fo:language="fr" fo:country="CH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, sans-serif" fo:font-size="11pt" style:font-name-asian="Liberation Sans1" style:font-family-asian="'Liberation Sans', sans-serif" style:font-size-asian="11pt" style:font-name-complex="Liberation Sans1" style:font-family-complex="'Liberation Sans'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chapter"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cm" fo:margin-right="0cm" fo:margin-top="0.049cm" fo:margin-bottom="0.21cm" style:contextual-spacing="false" fo:text-indent="0cm" style:auto-text-indent="false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monospace" style:font-name-asian="Liberation Mono" style:font-family-asian="'Liberation Mono', monospace" style:font-name-complex="Liberation Mono" style:font-family-complex="'Liberation Mono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26-06-15T15:03:35.678195817</meta:creation-date>
    <meta:editing-duration>PT16M57S</meta:editing-duration>
    <meta:editing-cycles>3</meta:editing-cycles>
    <dc:date>2026-06-15T15:21:57.211631282</dc:date>
    <meta:document-statistic meta:table-count="0" meta:image-count="0" meta:object-count="0" meta:page-count="10" meta:paragraph-count="402" meta:word-count="3098" meta:character-count="14049" meta:non-whitespace-character-count="11245"/>
    <meta:user-defined meta:name=""/>
  </office:meta>
</office:document-meta>
</file>